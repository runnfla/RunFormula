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5pt" style:text-underline-style="none" fo:font-weight="bold" style:text-blinking="false" loext:padding="0cm" loext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3" style:family="paragraph" style:parent-style-name="Text_20_body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5pt" style:text-underline-style="none" fo:font-weight="bold" style:text-blinking="false" loext:padding="0cm" loext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7" style:family="paragraph" style:parent-style-name="Text_20_body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text-underline-style="none" style:text-blinking="false" loext:padding="0cm" loext:border="none"/>
    </style:style>
    <style:style style:name="P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1" style:family="text">
      <style:text-properties style:text-line-through-style="none" style:text-line-through-type="none" fo:font-family="monospace" fo:font-size="10.5pt" style:text-underline-style="none" fo:font-weight="bold" officeooo:rsid="001c3d8a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2" style:family="text">
      <style:text-properties style:text-line-through-style="none" style:text-line-through-type="none" fo:font-family="monospace" fo:font-size="10.5pt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3" style:family="text"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4" style:family="text">
      <style:text-properties style:font-name="Google Sans" fo:font-size="15pt" fo:font-weight="bold"/>
    </style:style>
    <style:style style:name="T5" style:family="text">
      <style:text-properties officeooo:rsid="001b8365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плексный анализ</text:p>
      <text:list text:style-name="L1">
        <text:list-item>
          <text:p text:style-name="P2"><text:span text:style-name="Strong_20_Emphasis"><text:span text:style-name="Source_20_Text"><text:span text:style-name="T1">+</text:span></text:span></text:span><text:span text:style-name="Strong_20_Emphasis"><text:span text:style-name="Source_20_Text"><text:span text:style-name="T2">polar</text:span></text:span></text:span><text:span text:style-name="T3"> — перевод комплексного числа в полярные координаты (модуль и аргумент).</text:span></text:p>
        </text:list-item>
        <text:list-item>
          <text:p text:style-name="P2"><text:span text:style-name="Strong_20_Emphasis"><text:span text:style-name="Source_20_Text"><text:span text:style-name="T2">isreal</text:span></text:span></text:span><text:span text:style-name="T3"> — проверка, является ли число чисто действительным (мнимая часть равна 0).</text:span></text:p>
        </text:list-item>
        <text:list-item>
          <text:p text:style-name="P2"><text:span text:style-name="Strong_20_Emphasis"><text:span text:style-name="Source_20_Text"><text:span text:style-name="T2">isimag</text:span></text:span></text:span><text:span text:style-name="T3"> — проверка, является ли число чисто мнимым (действительная часть равна 0).</text:span></text:p>
        </text:list-item>
        <text:list-item>
          <text:p text:style-name="P2"><text:span text:style-name="Strong_20_Emphasis"><text:span text:style-name="Source_20_Text"><text:span text:style-name="T1">+</text:span></text:span></text:span><text:span text:style-name="Strong_20_Emphasis"><text:span text:style-name="Source_20_Text"><text:span text:style-name="T2">cis</text:span></text:span></text:span><text:span text:style-name="T3"> — вычисление комплексного экспоненциала (\(\cos(x) + i\sin(x)\)).</text:span></text:p>
        </text:list-item>
      </text:list>
      <text:p text:style-name="P3">Расширенная тригонометрия и гиперболы</text:p>
      <text:list text:style-name="L2">
        <text:list-item>
          <text:p text:style-name="P4"><text:span text:style-name="Strong_20_Emphasis"><text:span text:style-name="Source_20_Text"><text:span text:style-name="T2">tan</text:span></text:span></text:span><text:span text:style-name="T3"> — тангенс.</text:span></text:p>
        </text:list-item>
        <text:list-item>
          <text:p text:style-name="P4"><text:span text:style-name="Strong_20_Emphasis"><text:span text:style-name="Source_20_Text"><text:span text:style-name="T2">cot</text:span></text:span></text:span><text:span text:style-name="T3"> — котангенс.</text:span></text:p>
        </text:list-item>
        <text:list-item>
          <text:p text:style-name="P4"><text:span text:style-name="Strong_20_Emphasis"><text:span text:style-name="Source_20_Text"><text:span text:style-name="T2">arcsin</text:span></text:span></text:span><text:span text:style-name="T3"> — арксинус.</text:span></text:p>
        </text:list-item>
        <text:list-item>
          <text:p text:style-name="P4"><text:span text:style-name="Strong_20_Emphasis"><text:span text:style-name="Source_20_Text"><text:span text:style-name="T2">arccos</text:span></text:span></text:span><text:span text:style-name="T3"> — арккосинус.</text:span></text:p>
        </text:list-item>
        <text:list-item>
          <text:p text:style-name="P4"><text:span text:style-name="Strong_20_Emphasis"><text:span text:style-name="Source_20_Text"><text:span text:style-name="T2">sinh</text:span></text:span></text:span><text:span text:style-name="T3"> — гиперболический синус.</text:span></text:p>
        </text:list-item>
        <text:list-item>
          <text:p text:style-name="P4"><text:span text:style-name="Strong_20_Emphasis"><text:span text:style-name="Source_20_Text"><text:span text:style-name="T2">cosh</text:span></text:span></text:span><text:span text:style-name="T3"> — гиперболический косинус.</text:span></text:p>
        </text:list-item>
        <text:list-item>
          <text:p text:style-name="P4"><text:span text:style-name="Strong_20_Emphasis"><text:span text:style-name="Source_20_Text"><text:span text:style-name="T2">tanh</text:span></text:span></text:span><text:span text:style-name="T3"> — гиперболический тангенс.</text:span></text:p>
        </text:list-item>
        <text:list-item>
          <text:p text:style-name="P4"><text:span text:style-name="Strong_20_Emphasis"><text:span text:style-name="Source_20_Text"><text:span text:style-name="T2">asinh</text:span></text:span></text:span><text:span text:style-name="T3"> — обратный гиперболический синус.</text:span></text:p>
        </text:list-item>
        <text:list-item>
          <text:p text:style-name="P4"><text:span text:style-name="Strong_20_Emphasis"><text:span text:style-name="Source_20_Text"><text:span text:style-name="T2">acosh</text:span></text:span></text:span><text:span text:style-name="T3"> — обратный гиперболический косинус.</text:span></text:p>
        </text:list-item>
        <text:list-item>
          <text:p text:style-name="P4"><text:span text:style-name="Strong_20_Emphasis"><text:span text:style-name="Source_20_Text"><text:span text:style-name="T2">atanh</text:span></text:span></text:span><text:span text:style-name="T3"> — обратный гиперболический тангенс.</text:span></text:p>
        </text:list-item>
        <text:list-item>
          <text:p text:style-name="P4"><text:span text:style-name="Strong_20_Emphasis"><text:span text:style-name="Source_20_Text"><text:span text:style-name="T2">rad</text:span></text:span></text:span><text:span text:style-name="T3"> — конвертация градусов в радианы.</text:span></text:p>
        </text:list-item>
        <text:list-item>
          <text:p text:style-name="P4"><text:span text:style-name="Strong_20_Emphasis"><text:span text:style-name="Source_20_Text"><text:span text:style-name="T2">deg</text:span></text:span></text:span><text:span text:style-name="T3"> — конвертация радиан в градусы.</text:span></text:p>
        </text:list-item>
      </text:list>
      <text:p text:style-name="P3">Интервальный анализ</text:p>
      <text:list text:style-name="L3">
        <text:list-item>
          <text:p text:style-name="P5"><text:span text:style-name="Strong_20_Emphasis"><text:span text:style-name="Source_20_Text"><text:span text:style-name="T2">hull</text:span></text:span></text:span><text:span text:style-name="T3"> — интервальная оболочка (наименьший целый интервал, объединяющий другие).</text:span></text:p>
        </text:list-item>
        <text:list-item>
          <text:p text:style-name="P5"><text:span text:style-name="Strong_20_Emphasis"><text:span text:style-name="Source_20_Text"><text:span text:style-name="T1">+</text:span></text:span></text:span><text:span text:style-name="Strong_20_Emphasis"><text:span text:style-name="Source_20_Text"><text:span text:style-name="T2">mid</text:span></text:span></text:span><text:span text:style-name="T3"> — поиск средней точки (центра) интервала.</text:span></text:p>
        </text:list-item>
        <text:list-item>
          <text:p text:style-name="P5"><text:span text:style-name="Strong_20_Emphasis"><text:span text:style-name="Source_20_Text"><text:span text:style-name="T1">+</text:span></text:span></text:span><text:span text:style-name="Strong_20_Emphasis"><text:span text:style-name="Source_20_Text"><text:span text:style-name="T2">radius</text:span></text:span></text:span><text:span text:style-name="T3"> — вычисление радиуса (полуширины) интервала.</text:span></text:p>
        </text:list-item>
        <text:list-item>
          <text:p text:style-name="P5"><text:span text:style-name="Strong_20_Emphasis"><text:span text:style-name="Source_20_Text"><text:span text:style-name="T2">intersect</text:span></text:span></text:span><text:span text:style-name="T3"> — пересечение двух интервалов (общая их часть).</text:span></text:p>
        </text:list-item>
        <text:list-item>
          <text:p text:style-name="P5"><text:span text:style-name="Strong_20_Emphasis"><text:span text:style-name="Source_20_Text"><text:span text:style-name="T1">+</text:span></text:span></text:span><text:span text:style-name="Strong_20_Emphasis"><text:span text:style-name="Source_20_Text"><text:span text:style-name="T2">isinside</text:span></text:span></text:span><text:span text:style-name="T3"> — проверка, входит ли число или подинтервал внутрь интервала.</text:span></text:p>
        </text:list-item>
        <text:list-item>
          <text:p text:style-name="P5"><text:span text:style-name="Strong_20_Emphasis"><text:span text:style-name="Source_20_Text"><text:span text:style-name="T2">isempty</text:span></text:span></text:span><text:span text:style-name="T3"> — проверка, является ли интервал пустым множеством.</text:span></text:p>
        </text:list-item>
      </text:list>
      <text:p text:style-name="P3">Алгебра и теория чисел</text:p>
      <text:list text:style-name="L4">
        <text:list-item>
          <text:p text:style-name="P6"><text:span text:style-name="Strong_20_Emphasis"><text:span text:style-name="Source_20_Text"><text:span text:style-name="T2">log</text:span></text:span></text:span><text:span text:style-name="T3"> — логарифм по произвольному основанию.</text:span></text:p>
        </text:list-item>
        <text:list-item>
          <text:p text:style-name="P6"><text:span text:style-name="Strong_20_Emphasis"><text:span text:style-name="Source_20_Text"><text:span text:style-name="T2">log10</text:span></text:span></text:span><text:span text:style-name="T3"> — десятичный логарифм.</text:span></text:p>
        </text:list-item>
        <text:list-item>
          <text:p text:style-name="P6"><text:span text:style-name="Strong_20_Emphasis"><text:span text:style-name="Source_20_Text"><text:span text:style-name="T2">log2</text:span></text:span></text:span><text:span text:style-name="T3"> — двоичный логарифм.</text:span></text:p>
        </text:list-item>
        <text:list-item>
          <text:p text:style-name="P6"><text:span text:style-name="Strong_20_Emphasis"><text:span text:style-name="Source_20_Text"><text:span text:style-name="T2">pow</text:span></text:span></text:span><text:span text:style-name="T3"> — возведение в степень.</text:span></text:p>
        </text:list-item>
        <text:list-item>
          <text:p text:style-name="P6"><text:span text:style-name="Strong_20_Emphasis"><text:span text:style-name="Source_20_Text"><text:span text:style-name="T1">+</text:span></text:span></text:span><text:span text:style-name="Strong_20_Emphasis"><text:span text:style-name="Source_20_Text"><text:span text:style-name="T2">mod</text:span></text:span></text:span><text:span text:style-name="T3"> — остаток от деления (по знаку делимого).</text:span></text:p>
        </text:list-item>
        <text:list-item>
          <text:p text:style-name="P6"><text:soft-page-break/><text:span text:style-name="Strong_20_Emphasis"><text:span text:style-name="Source_20_Text"><text:span text:style-name="T2">rem</text:span></text:span></text:span><text:span text:style-name="T3"> — остаток от деления (по знаку делителя).</text:span></text:p>
        </text:list-item>
        <text:list-item>
          <text:p text:style-name="P6"><text:span text:style-name="Strong_20_Emphasis"><text:span text:style-name="Source_20_Text"><text:span text:style-name="T2">gcd</text:span></text:span></text:span><text:span text:style-name="T3"> — наибольший общий делитель (НОД).</text:span></text:p>
        </text:list-item>
        <text:list-item>
          <text:p text:style-name="P6"><text:span text:style-name="Strong_20_Emphasis"><text:span text:style-name="Source_20_Text"><text:span text:style-name="T2">lcm</text:span></text:span></text:span><text:span text:style-name="T3"> — наименьшее общее кратное (НОК).</text:span></text:p>
        </text:list-item>
        <text:list-item>
          <text:p text:style-name="P6"><text:span text:style-name="Strong_20_Emphasis"><text:span text:style-name="Source_20_Text"><text:span text:style-name="T2">min</text:span></text:span></text:span><text:span text:style-name="T3"> — поиск минимального значения из списка аргументов.</text:span></text:p>
        </text:list-item>
        <text:list-item>
          <text:p text:style-name="P6"><text:span text:style-name="Strong_20_Emphasis"><text:span text:style-name="Source_20_Text"><text:span text:style-name="T2">max</text:span></text:span></text:span><text:span text:style-name="T3"> — поиск максимального значения из списка аргументов.</text:span></text:p>
        </text:list-item>
      </text:list>
      <text:p text:style-name="P7"><text:s/><text:span text:style-name="T4">Системные и управляющие функции</text:span></text:p>
      <text:list text:style-name="L5">
        <text:list-item>
          <text:p text:style-name="P8"><text:span text:style-name="Strong_20_Emphasis"><text:span text:style-name="Source_20_Text"><text:span text:style-name="T2">while</text:span></text:span></text:span><text:span text:style-name="T3"> — цикл с предусловием для управляющих конструкций.</text:span></text:p>
        </text:list-item>
        <text:list-item>
          <text:p text:style-name="P8"><text:span text:style-name="Strong_20_Emphasis"><text:span text:style-name="Source_20_Text"><text:span text:style-name="T2">error</text:span></text:span></text:span><text:span text:style-name="T3"> — генерация пользовательской ошибки с остановкой парсинга.</text:span></text:p>
        </text:list-item>
        <text:list-item>
          <text:p text:style-name="P8"><text:span text:style-name="Strong_20_Emphasis"><text:span text:style-name="Source_20_Text"><text:span text:style-name="T2">isnan</text:span></text:span></text:span><text:span text:style-name="T3"> — проверка значения на "не-число" (NaN).</text:span></text:p>
        </text:list-item>
        <text:list-item>
          <text:p text:style-name="P8"><text:span text:style-name="Strong_20_Emphasis"><text:span text:style-name="Source_20_Text"><text:span text:style-name="T2">isinf</text:span></text:span></text:span><text:span text:style-name="T3"> — проверка значения на бесконечность (Infinity).</text:span></text:p>
        </text:list-item>
        <text:list-item>
          <text:p text:style-name="P8"><text:span text:style-name="Strong_20_Emphasis"><text:span text:style-name="Source_20_Text"><text:span text:style-name="T2">print</text:span></text:span></text:span><text:span text:style-name="T3"> — вывод значения в консоль или лог для отладки выражений.</text:span></text:p>
        </text:list-item>
      </text:list>
      <text:p text:style-name="P9">replace(&lt;строка&gt;, &lt;интервал&gt;, &lt;новаяСтрока&gt;)</text:p>
      <text:p text:style-name="P9">replace<text:span text:style-name="T5">all</text:span>(&lt;строка&gt;,<text:span text:style-name="T5">[ <text:s/></text:span><text:s/>&lt;интервал&gt;,<text:span text:style-name="T5">] </text:span><text:s/>&lt;новаяСтрока&gt;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3T08:56:37.486393700</meta:creation-date>
    <dc:date>2026-06-23T13:28:22.323758600</dc:date>
    <meta:editing-duration>PT11M11S</meta:editing-duration>
    <meta:editing-cycles>3</meta:editing-cycles>
    <meta:generator>LibreOffice/26.2.3.2$Windows_X86_64 LibreOffice_project/70e089b17412e4cb7773e41413306b17a2328c34</meta:generator>
    <meta:document-statistic meta:table-count="0" meta:image-count="0" meta:object-count="0" meta:page-count="2" meta:paragraph-count="44" meta:word-count="268" meta:character-count="1969" meta:non-whitespace-character-count="1740"/>
  </office:meta>
</office:document-meta>
</file>